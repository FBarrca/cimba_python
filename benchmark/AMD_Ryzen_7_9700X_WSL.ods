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raw="urn:oasis:names:tc:opendocument:xmlns:drawing:1.0" xmlns:fo="urn:oasis:names:tc:opendocument:xmlns:xsl-fo-compatib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4">
  <office:font-face-decls>
    <style:font-face style:name="Nimbus Sans" svg:font-family="&quot;Nimbus Sans&quot;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ext-properties fo:color="#000000" style:font-name="JetBrains Mono" style:font-name-asian="JetBrains Mono" style:font-name-complex="JetBrains Mono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1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5" style:family="table-cell" style:parent-style-name="Default" style:data-style-name="N15">
      <style:table-cell-properties fo:border-top="thin solid #000000" fo:border-bottom="thin solid #000000" fo:border-left="none" fo:border-right="none"/>
    </style:style>
    <style:style style:name="ce16" style:family="table-cell" style:parent-style-name="Default" style:data-style-name="N37"/>
    <style:style style:name="ce17" style:family="table-cell" style:parent-style-name="Default" style:data-style-name="N13"/>
    <style:style style:name="ce18" style:family="table-cell" style:parent-style-name="Default" style:data-style-name="N38"/>
    <style:style style:name="ce19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text-underline-style="solid" style:text-underline-type="single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2" style:family="table-cell" style:parent-style-name="Default" style:data-style-name="N0">
      <style:text-properties fo:color="#808080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808080"/>
    </style:style>
    <style:style style:name="ce24" style:family="table-cell" style:parent-style-name="Default" style:data-style-name="N15">
      <style:text-properties fo:color="#808080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808080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/>
      <style:text-properties style:text-underline-style="solid" style:text-underline-type="single"/>
    </style:style>
    <style:style style:name="ce28" style:family="table-cell" style:parent-style-name="Default" style:data-style-name="N0"/>
    <style:style style:name="ce29" style:family="table-cell" style:parent-style-name="Default" style:data-style-name="N37"/>
    <style:style style:name="ce30" style:family="table-cell" style:parent-style-name="Default" style:data-style-name="N14"/>
    <style:style style:name="ce31" style:family="table-cell" style:parent-style-name="Default" style:data-style-name="N38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0.026in" svg:y="6.2311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2">
            <text:p>Runtime for benchmarks (seconds)</text:p>
          </table:table-cell>
          <table:table-cell table:style-name="ce2"/>
          <table:table-cell table:number-columns-repeated="10" table:style-name="ce3"/>
          <table:table-cell table:number-columns-repeated="16372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table:number-columns-repeated="16372"/>
        </table:table-row>
        <table:table-row table:style-name="ro2">
          <table:table-cell office:value-type="string" table:number-columns-spanned="3" table:number-rows-spanned="1" table:style-name="ce25">
            <text:p>Single core, single trial</text:p>
          </table:table-cell>
          <table:covered-table-cell table:number-columns-repeated="2"/>
          <table:table-cell office:value-type="string" table:number-columns-spanned="3" table:number-rows-spanned="1" table:style-name="ce25">
            <text:p>Multicore, 100 trials</text:p>
          </table:table-cell>
          <table:covered-table-cell table:number-columns-repeated="2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">
            <text:p>SimPy</text:p>
          </table:table-cell>
          <table:table-cell office:value-type="string" table:style-name="ce3">
            <text:p>Cimba Python</text:p>
          </table:table-cell>
          <table:table-cell office:value-type="string" table:style-name="ce3">
            <text:p>Cimba</text:p>
          </table:table-cell>
          <table:table-cell office:value-type="string" table:style-name="ce3">
            <text:p>SimPy</text:p>
          </table:table-cell>
          <table:table-cell office:value-type="string" table:style-name="ce3">
            <text:p>Cimba Python</text:p>
          </table:table-cell>
          <table:table-cell office:value-type="string" table:style-name="ce3">
            <text:p>Cimba</text:p>
          </table:table-cell>
          <table:table-cell table:number-columns-repeated="4" table:style-name="ce3"/>
          <table:table-cell office:value-type="string" table:style-name="ce3">
            <text:p>Compiler:</text:p>
          </table:table-cell>
          <table:table-cell office:value-type="string" table:style-name="ce3">
            <text:p>gcc</text:p>
          </table:table-cell>
          <table:table-cell table:number-columns-repeated="16372"/>
        </table:table-row>
        <table:table-row table:style-name="ro2">
          <table:table-cell office:value-type="float" office:value="2.6197417799999982" table:style-name="ce3">
            <text:p>2.619741780</text:p>
          </table:table-cell>
          <table:table-cell office:value-type="float" office:value="0.094102161999998657" table:style-name="ce3">
            <text:p>0.094102162</text:p>
          </table:table-cell>
          <table:table-cell office:value-type="float" office:value="0.085914611999996282" table:style-name="ce3">
            <text:p>0.085914612</text:p>
          </table:table-cell>
          <table:table-cell office:value-type="float" office:value="34.628333812999983" table:style-name="ce3">
            <text:p>34.628333813</text:p>
          </table:table-cell>
          <table:table-cell office:value-type="float" office:value="1.0980105019999655" table:style-name="ce3">
            <text:p>1.098010502</text:p>
          </table:table-cell>
          <table:table-cell office:value-type="float" office:value="1.0827458699999966" table:style-name="ce3">
            <text:p>1.082745870</text:p>
          </table:table-cell>
          <table:table-cell table:number-columns-repeated="4" table:style-name="ce3"/>
          <table:table-cell office:value-type="string" table:style-name="ce3">
            <text:p>Flags:</text:p>
          </table:table-cell>
          <table:table-cell office:value-type="string" table:style-name="ce5">
            <text:p>-Wno-pedantic</text:p>
          </table:table-cell>
          <table:table-cell table:number-columns-repeated="16372"/>
        </table:table-row>
        <table:table-row table:style-name="ro2">
          <table:table-cell office:value-type="float" office:value="2.5924036079999979" table:style-name="ce3">
            <text:p>2.592403608</text:p>
          </table:table-cell>
          <table:table-cell office:value-type="float" office:value="0.094925721999999269" table:style-name="ce3">
            <text:p>0.094925722</text:p>
          </table:table-cell>
          <table:table-cell office:value-type="float" office:value="0.083784950999998387" table:style-name="ce3">
            <text:p>0.083784951</text:p>
          </table:table-cell>
          <table:table-cell office:value-type="float" office:value="36.708404672" table:style-name="ce3">
            <text:p>36.708404672</text:p>
          </table:table-cell>
          <table:table-cell office:value-type="float" office:value="1.1025543760000005" table:style-name="ce3">
            <text:p>1.102554376</text:p>
          </table:table-cell>
          <table:table-cell office:value-type="float" office:value="1.0001840400000219" table:style-name="ce3">
            <text:p>1.000184040</text:p>
          </table:table-cell>
          <table:table-cell table:number-columns-repeated="5" table:style-name="ce3"/>
          <table:table-cell office:value-type="string" table:style-name="ce5">
            <text:p>-D_POSIX_C_SOURCE=200809L</text:p>
          </table:table-cell>
          <table:table-cell table:number-columns-repeated="16372"/>
        </table:table-row>
        <table:table-row table:style-name="ro2">
          <table:table-cell office:value-type="float" office:value="2.7684304999999938" table:style-name="ce3">
            <text:p>2.768430500</text:p>
          </table:table-cell>
          <table:table-cell office:value-type="float" office:value="0.095763343000001555" table:style-name="ce3">
            <text:p>0.095763343</text:p>
          </table:table-cell>
          <table:table-cell office:value-type="float" office:value="0.083200868999995237" table:style-name="ce3">
            <text:p>0.083200869</text:p>
          </table:table-cell>
          <table:table-cell office:value-type="float" office:value="35.605014560000001" table:style-name="ce3">
            <text:p>35.605014560</text:p>
          </table:table-cell>
          <table:table-cell office:value-type="float" office:value="1.1785680579999962" table:style-name="ce3">
            <text:p>1.178568058</text:p>
          </table:table-cell>
          <table:table-cell office:value-type="float" office:value="0.95698494499998787" table:style-name="ce3">
            <text:p>0.956984945</text:p>
          </table:table-cell>
          <table:table-cell table:number-columns-repeated="5" table:style-name="ce3"/>
          <table:table-cell office:value-type="string" table:style-name="ce5">
            <text:p>-fno-semantic-interposition</text:p>
          </table:table-cell>
          <table:table-cell table:number-columns-repeated="16372"/>
        </table:table-row>
        <table:table-row table:style-name="ro2">
          <table:table-cell office:value-type="float" office:value="2.595356682000002" table:style-name="ce3">
            <text:p>2.595356682</text:p>
          </table:table-cell>
          <table:table-cell office:value-type="float" office:value="0.094910619000003749" table:style-name="ce3">
            <text:p>0.094910619</text:p>
          </table:table-cell>
          <table:table-cell office:value-type="float" office:value="0.083465410000002294" table:style-name="ce3">
            <text:p>0.083465410</text:p>
          </table:table-cell>
          <table:table-cell office:value-type="float" office:value="37.43189399100001" table:style-name="ce3">
            <text:p>37.431893991</text:p>
          </table:table-cell>
          <table:table-cell office:value-type="float" office:value="1.1235993270000222" table:style-name="ce3">
            <text:p>1.123599327</text:p>
          </table:table-cell>
          <table:table-cell office:value-type="float" office:value="0.93207738099999915" table:style-name="ce3">
            <text:p>0.932077381</text:p>
          </table:table-cell>
          <table:table-cell table:style-name="ce3"/>
          <table:table-cell office:value-type="string" table:style-name="ce6">
            <text:p>Events per object</text:p>
          </table:table-cell>
          <table:table-cell office:value-type="float" office:value="4" table:style-name="ce7">
            <text:p>4</text:p>
          </table:table-cell>
          <table:table-cell table:number-columns-repeated="2" table:style-name="ce3"/>
          <table:table-cell office:value-type="string" table:style-name="ce5">
            <text:p>-fprofile-use</text:p>
          </table:table-cell>
          <table:table-cell table:number-columns-repeated="16372"/>
        </table:table-row>
        <table:table-row table:style-name="ro2">
          <table:table-cell office:value-type="float" office:value="2.6432543629999969" table:style-name="ce3">
            <text:p>2.643254363</text:p>
          </table:table-cell>
          <table:table-cell office:value-type="float" office:value="0.095031470000009222" table:style-name="ce3">
            <text:p>0.095031470</text:p>
          </table:table-cell>
          <table:table-cell office:value-type="float" office:value="0.085780028000002062" table:style-name="ce3">
            <text:p>0.085780028</text:p>
          </table:table-cell>
          <table:table-cell office:value-type="float" office:value="37.165988266000028" table:style-name="ce3">
            <text:p>37.165988266</text:p>
          </table:table-cell>
          <table:table-cell office:value-type="float" office:value="1.105789241000025" table:style-name="ce3">
            <text:p>1.105789241</text:p>
          </table:table-cell>
          <table:table-cell office:value-type="float" office:value="0.94188665400002947" table:style-name="ce3">
            <text:p>0.941886654</text:p>
          </table:table-cell>
          <table:table-cell table:style-name="ce3"/>
          <table:table-cell office:value-type="string" table:style-name="ce8">
            <text:p>Objects per trial</text:p>
          </table:table-cell>
          <table:table-cell office:value-type="float" office:value="1000000" table:style-name="ce9">
            <text:p>1000000</text:p>
          </table:table-cell>
          <table:table-cell table:number-columns-repeated="2" table:style-name="ce3"/>
          <table:table-cell office:value-type="string" table:style-name="ce5">
            <text:p>-fprofile-correction</text:p>
          </table:table-cell>
          <table:table-cell table:number-columns-repeated="16372"/>
        </table:table-row>
        <table:table-row table:style-name="ro2">
          <table:table-cell office:value-type="float" office:value="2.5790283880000118" table:style-name="ce3">
            <text:p>2.579028388</text:p>
          </table:table-cell>
          <table:table-cell office:value-type="float" office:value="0.09941863499999215" table:style-name="ce3">
            <text:p>0.099418635</text:p>
          </table:table-cell>
          <table:table-cell office:value-type="float" office:value="0.08282648899999856" table:style-name="ce3">
            <text:p>0.082826489</text:p>
          </table:table-cell>
          <table:table-cell office:value-type="float" office:value="37.309879539999997" table:style-name="ce3">
            <text:p>37.309879540</text:p>
          </table:table-cell>
          <table:table-cell office:value-type="float" office:value="1.0934197149999818" table:style-name="ce3">
            <text:p>1.093419715</text:p>
          </table:table-cell>
          <table:table-cell office:value-type="float" office:value="0.93761957499998516" table:style-name="ce3">
            <text:p>0.937619575</text:p>
          </table:table-cell>
          <table:table-cell table:style-name="ce3"/>
          <table:table-cell office:value-type="string" table:style-name="ce10">
            <text:p>Events per trial</text:p>
          </table:table-cell>
          <table:table-cell office:value-type="float" office:value="4000000" table:formula="of:=[.I8]*[.I9]" table:style-name="ce11">
            <text:p>4000000</text:p>
          </table:table-cell>
          <table:table-cell table:number-columns-repeated="2" table:style-name="ce3"/>
          <table:table-cell office:value-type="string" table:style-name="ce5">
            <text:p>-O3</text:p>
          </table:table-cell>
          <table:table-cell table:number-columns-repeated="16372"/>
        </table:table-row>
        <table:table-row table:style-name="ro2">
          <table:table-cell office:value-type="float" office:value="2.5599109740000046" table:style-name="ce3">
            <text:p>2.559910974</text:p>
          </table:table-cell>
          <table:table-cell office:value-type="float" office:value="0.094182568000007905" table:style-name="ce3">
            <text:p>0.094182568</text:p>
          </table:table-cell>
          <table:table-cell office:value-type="float" office:value="0.081278501999989317" table:style-name="ce3">
            <text:p>0.081278502</text:p>
          </table:table-cell>
          <table:table-cell office:value-type="float" office:value="37.413073693000001" table:style-name="ce3">
            <text:p>37.413073693</text:p>
          </table:table-cell>
          <table:table-cell office:value-type="float" office:value="1.0905026290000137" table:style-name="ce3">
            <text:p>1.090502629</text:p>
          </table:table-cell>
          <table:table-cell office:value-type="float" office:value="0.96457690100004356" table:style-name="ce3">
            <text:p>0.964576901</text:p>
          </table:table-cell>
          <table:table-cell table:style-name="ce3"/>
          <table:table-cell office:value-type="string" table:style-name="ce8">
            <text:p>Number of trials</text:p>
          </table:table-cell>
          <table:table-cell office:value-type="float" office:value="100" table:style-name="ce12">
            <text:p>100</text:p>
          </table:table-cell>
          <table:table-cell table:number-columns-repeated="2" table:style-name="ce3"/>
          <table:table-cell office:value-type="string" table:style-name="ce5">
            <text:p>-DNDEBUG</text:p>
          </table:table-cell>
          <table:table-cell table:number-columns-repeated="16372"/>
        </table:table-row>
        <table:table-row table:style-name="ro2">
          <table:table-cell office:value-type="float" office:value="2.570413507000012" table:style-name="ce3">
            <text:p>2.570413507</text:p>
          </table:table-cell>
          <table:table-cell office:value-type="float" office:value="0.095568413999998825" table:style-name="ce3">
            <text:p>0.095568414</text:p>
          </table:table-cell>
          <table:table-cell office:value-type="float" office:value="0.08108834300000467" table:style-name="ce3">
            <text:p>0.081088343</text:p>
          </table:table-cell>
          <table:table-cell office:value-type="float" office:value="36.955969863000007" table:style-name="ce3">
            <text:p>36.955969863</text:p>
          </table:table-cell>
          <table:table-cell office:value-type="float" office:value="1.1794069140000261" table:style-name="ce3">
            <text:p>1.179406914</text:p>
          </table:table-cell>
          <table:table-cell office:value-type="float" office:value="0.96362500999998701" table:style-name="ce3">
            <text:p>0.963625010</text:p>
          </table:table-cell>
          <table:table-cell table:style-name="ce3"/>
          <table:table-cell office:value-type="string" table:style-name="ce10">
            <text:p>Total events</text:p>
          </table:table-cell>
          <table:table-cell office:value-type="float" office:value="400000000" table:formula="of:=[.I10]*[.I11]" table:style-name="ce11">
            <text:p>400000000</text:p>
          </table:table-cell>
          <table:table-cell table:number-columns-repeated="2" table:style-name="ce3"/>
          <table:table-cell office:value-type="string" table:style-name="ce5">
            <text:p>-DNLOGINFO</text:p>
          </table:table-cell>
          <table:table-cell table:number-columns-repeated="16372"/>
        </table:table-row>
        <table:table-row table:style-name="ro2">
          <table:table-cell office:value-type="float" office:value="2.5728758549999924" table:style-name="ce3">
            <text:p>2.572875855</text:p>
          </table:table-cell>
          <table:table-cell office:value-type="float" office:value="0.09488174099999469" table:style-name="ce3">
            <text:p>0.094881741</text:p>
          </table:table-cell>
          <table:table-cell office:value-type="float" office:value="0.081714830999999322" table:style-name="ce3">
            <text:p>0.081714831</text:p>
          </table:table-cell>
          <table:table-cell office:value-type="float" office:value="37.780802268000002" table:style-name="ce3">
            <text:p>37.780802268</text:p>
          </table:table-cell>
          <table:table-cell office:value-type="float" office:value="1.1340836140000192" table:style-name="ce3">
            <text:p>1.134083614</text:p>
          </table:table-cell>
          <table:table-cell office:value-type="float" office:value="0.94803646899998739" table:style-name="ce3">
            <text:p>0.948036469</text:p>
          </table:table-cell>
          <table:table-cell table:number-columns-repeated="5" table:style-name="ce3"/>
          <table:table-cell office:value-type="string" table:style-name="ce5">
            <text:p>-DNASSERT</text:p>
          </table:table-cell>
          <table:table-cell table:number-columns-repeated="16372"/>
        </table:table-row>
        <table:table-row table:style-name="ro2">
          <table:table-cell office:value-type="float" office:value="2.6191201480000075" table:style-name="ce3">
            <text:p>2.619120148</text:p>
          </table:table-cell>
          <table:table-cell office:value-type="float" office:value="0.096415895000006913" table:style-name="ce3">
            <text:p>0.096415895</text:p>
          </table:table-cell>
          <table:table-cell office:value-type="float" office:value="0.080429316999996558" table:style-name="ce3">
            <text:p>0.080429317</text:p>
          </table:table-cell>
          <table:table-cell office:value-type="float" office:value="37.066893472000004" table:style-name="ce3">
            <text:p>37.066893472</text:p>
          </table:table-cell>
          <table:table-cell office:value-type="float" office:value="1.2022298210000031" table:style-name="ce3">
            <text:p>1.202229821</text:p>
          </table:table-cell>
          <table:table-cell office:value-type="float" office:value="0.97438415300001679" table:style-name="ce3">
            <text:p>0.974384153</text:p>
          </table:table-cell>
          <table:table-cell table:number-columns-repeated="5" table:style-name="ce3"/>
          <table:table-cell office:value-type="string" table:style-name="ce5">
            <text:p>-DNMXCSR</text:p>
          </table:table-cell>
          <table:table-cell table:number-columns-repeated="16372"/>
        </table:table-row>
        <table:table-row table:style-name="ro2">
          <table:table-cell office:value-type="float" office:value="2.6120535805000018" table:formula="of:=AVERAGE([.A5:.A14])" table:style-name="ce14">
            <text:p>2.612</text:p>
          </table:table-cell>
          <table:table-cell office:value-type="float" office:value="0.095520056900001288" table:formula="of:=AVERAGE([.B5:.B14])" table:style-name="ce14">
            <text:p>0.096</text:p>
          </table:table-cell>
          <table:table-cell office:value-type="float" office:value="0.082948335199998266" table:formula="of:=AVERAGE([.C5:.C14])" table:style-name="ce14">
            <text:p>0.083</text:p>
          </table:table-cell>
          <table:table-cell office:value-type="float" office:value="36.806625413800006" table:formula="of:=AVERAGE([.D5:.D14])" table:style-name="ce14">
            <text:p>36.807</text:p>
          </table:table-cell>
          <table:table-cell office:value-type="float" office:value="1.1308164197000052" table:formula="of:=AVERAGE([.E5:.E14])" table:style-name="ce14">
            <text:p>1.131</text:p>
          </table:table-cell>
          <table:table-cell office:value-type="float" office:value="0.97021209980000545" table:formula="of:=AVERAGE([.F5:.F14])" table:style-name="ce14">
            <text:p>0.970</text:p>
          </table:table-cell>
          <table:table-cell office:value-type="string" table:style-name="ce3">
            <text:p>Avg (s)</text:p>
          </table:table-cell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float" office:value="1531362.1549961912" table:formula="of:=[.I10]/[.A15]" table:style-name="ce15">
            <text:p>1.53E+06</text:p>
          </table:table-cell>
          <table:table-cell office:value-type="float" office:value="41876021.956179827" table:formula="of:=[.I10]/[.B15]" table:style-name="ce15">
            <text:p>4.19E+07</text:p>
          </table:table-cell>
          <table:table-cell office:value-type="float" office:value="48222788.201300554" table:formula="of:=[.I10]/[.C15]" table:style-name="ce15">
            <text:p>4.82E+07</text:p>
          </table:table-cell>
          <table:table-cell office:value-type="float" office:value="10867608.630320858" table:formula="of:=[.I12]/[.D15]" table:style-name="ce15">
            <text:p>1.09E+07</text:p>
          </table:table-cell>
          <table:table-cell office:value-type="float" office:value="353726734.97800481" table:formula="of:=[.I12]/[.E15]" table:style-name="ce15">
            <text:p>3.54E+08</text:p>
          </table:table-cell>
          <table:table-cell office:value-type="float" office:value="412280984.830486" table:formula="of:=[.I12]/[.F15]" table:style-name="ce15">
            <text:p>4.12E+08</text:p>
          </table:table-cell>
          <table:table-cell office:value-type="string" table:style-name="ce3">
            <text:p>Avg (ev/s)</text:p>
          </table:table-cell>
          <table:table-cell table:number-columns-repeated="3" table:style-name="ce3"/>
          <table:table-cell office:value-type="string" table:style-name="ce3">
            <text:p>Compiler:</text:p>
          </table:table-cell>
          <table:table-cell office:value-type="string" table:style-name="ce3">
            <text:p>gcc 13.3.0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7.345603271934049" table:formula="of:=[.A15]/[.B15]" table:style-name="ce29">
            <text:p>27.3</text:p>
          </table:table-cell>
          <table:table-cell office:value-type="float" office:value="31.490126645725091" table:formula="of:=[.A15]/[.C15]" table:style-name="ce16">
            <text:p>31.5</text:p>
          </table:table-cell>
          <table:table-cell table:style-name="ce3"/>
          <table:table-cell office:value-type="float" office:value="32.548718582954827" table:formula="of:=[.D15]/[.E15]" table:style-name="ce16">
            <text:p>32.5</text:p>
          </table:table-cell>
          <table:table-cell office:value-type="float" office:value="37.936679434720652" table:formula="of:=[.D15]/[.F15]" table:style-name="ce16">
            <text:p>37.9</text:p>
          </table:table-cell>
          <table:table-cell office:value-type="string" table:style-name="ce3">
            <text:p>Speedup factor</text:p>
          </table:table-cell>
          <table:table-cell table:number-columns-repeated="3" table:style-name="ce3"/>
          <table:table-cell office:value-type="string" table:style-name="ce3">
            <text:p>Python:</text:p>
          </table:table-cell>
          <table:table-cell office:value-type="string" table:style-name="ce3">
            <text:p>Python 3.13.5, SimPy 4.1.2, Numba 0.65.1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6.345603271934049" table:formula="of:=([.B16]-[.A16])/[.A16]" table:style-name="ce31">
            <text:p>2634.6%</text:p>
          </table:table-cell>
          <table:table-cell office:value-type="float" office:value="30.490126645725091" table:formula="of:=([.C16]-[.A16])/[.A16]" table:style-name="ce17">
            <text:p>3049.0%</text:p>
          </table:table-cell>
          <table:table-cell table:style-name="ce3"/>
          <table:table-cell office:value-type="float" office:value="31.548718582954827" table:formula="of:=([.E16]-[.D16])/[.D16]" table:style-name="ce17">
            <text:p>3154.9%</text:p>
          </table:table-cell>
          <table:table-cell office:value-type="float" office:value="36.936679434720652" table:formula="of:=([.F16]-[.D16])/[.D16]" table:style-name="ce17">
            <text:p>3693.7%</text:p>
          </table:table-cell>
          <table:table-cell office:value-type="string" table:style-name="ce3">
            <text:p>Percent more events per second</text:p>
          </table:table-cell>
          <table:table-cell table:number-columns-repeated="5" table:style-name="ce3"/>
          <table:table-cell table:number-columns-repeated="16372"/>
        </table:table-row>
        <table:table-row table:style-name="ro2">
          <table:table-cell table:style-name="ce3"/>
          <table:table-cell office:value-type="float" office:value="-0.96343104995506379" table:formula="of:=([.B15]-[.A15])/[.A15]" table:style-name="ce30">
            <text:p>-96.3%</text:p>
          </table:table-cell>
          <table:table-cell office:value-type="float" office:value="-0.96824401466369603" table:formula="of:=([.C15]-[.A15])/[.A15]" table:style-name="ce18">
            <text:p>-96.8%</text:p>
          </table:table-cell>
          <table:table-cell table:style-name="ce3"/>
          <table:table-cell office:value-type="float" office:value="-0.96927682429489925" table:formula="of:=([.E15]-[.D15])/[.D15]" table:style-name="ce18">
            <text:p>-96.9%</text:p>
          </table:table-cell>
          <table:table-cell office:value-type="float" office:value="-0.97364028652742929" table:formula="of:=([.F15]-[.D15])/[.D15]" table:style-name="ce18">
            <text:p>-97.4%</text:p>
          </table:table-cell>
          <table:table-cell office:value-type="string" table:style-name="ce3">
            <text:p>Percent shorter run time</text:p>
          </table:table-cell>
          <table:table-cell table:number-columns-repeated="5" table:style-name="ce3"/>
          <table:table-cell table:number-columns-repeated="16372"/>
        </table:table-row>
        <table:table-row table:number-rows-repeated="2" table:style-name="ro2">
          <table:table-cell table:number-columns-repeated="12" table:style-name="ce3"/>
          <table:table-cell table:number-columns-repeated="16372"/>
        </table:table-row>
        <table:table-row table:style-name="ro2">
          <table:table-cell office:value-type="string" table:style-name="ce19">
            <text:p>System information</text:p>
          </table:table-cell>
          <table:table-cell table:style-name="ce27"/>
          <table:table-cell table:number-columns-repeated="4" table:style-name="ce4"/>
          <table:table-cell table:style-name="ce7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8">
            <text:p>OS</text:p>
          </table:table-cell>
          <table:table-cell table:style-name="ce28"/>
          <table:table-cell office:value-type="string" table:style-name="ce3">
            <text:p>WSL Ubuntu 24.04 on Microsoft hypervisor</text:p>
          </table:table-cell>
          <table:table-cell table:number-columns-repeated="3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8">
            <text:p>Motherboard</text:p>
          </table:table-cell>
          <table:table-cell table:style-name="ce28"/>
          <table:table-cell office:value-type="string" table:style-name="ce3">
            <text:p><text:s/>ASUS PRIME X670E-PRO WIFI</text:p>
          </table:table-cell>
          <table:table-cell table:number-columns-repeated="3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8">
            <text:p>CPU</text:p>
          </table:table-cell>
          <table:table-cell table:style-name="ce28"/>
          <table:table-cell office:value-type="string" table:style-name="ce3">
            <text:p>AMD Ryzen 7 9700X 8-Core Processor</text:p>
          </table:table-cell>
          <table:table-cell table:number-columns-repeated="3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8">
            <text:p>RAM</text:p>
          </table:table-cell>
          <table:table-cell table:style-name="ce28"/>
          <table:table-cell office:value-type="string" table:style-name="ce3">
            <text:p>96.0 GiB</text:p>
          </table:table-cell>
          <table:table-cell table:number-columns-repeated="3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8">
            <text:p>Disk</text:p>
          </table:table-cell>
          <table:table-cell table:style-name="ce28"/>
          <table:table-cell office:value-type="string" table:style-name="ce3">
            <text:p>2.0 TB</text:p>
          </table:table-cell>
          <table:table-cell table:number-columns-repeated="3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table:style-name="ce8"/>
          <table:table-cell table:style-name="ce28"/>
          <table:table-cell table:number-columns-repeated="4" table:style-name="ce3"/>
          <table:table-cell table:style-name="ce12"/>
          <table:table-cell table:number-columns-repeated="5" table:style-name="ce3"/>
          <table:table-cell table:number-columns-repeated="16372"/>
        </table:table-row>
        <table:table-row table:style-name="ro2">
          <table:table-cell office:value-type="string" table:style-name="ce20">
            <text:p>Wall-clock timings averaged over 10 runs; Cimba Python excludes one-time Numba compile</text:p>
          </table:table-cell>
          <table:table-cell table:number-columns-repeated="5" table:style-name="ce13"/>
          <table:table-cell table:style-name="ce21"/>
          <table:table-cell table:number-columns-repeated="5" table:style-name="ce3"/>
          <table:table-cell table:number-columns-repeated="16372"/>
        </table:table-row>
        <table:table-row table:style-name="ro2">
          <table:table-cell table:style-name="ce3" office:value-type="string">
            <text:p>Cimba Python warm compile: single 0.384 s, multicore 0.196 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office:value-type="string" table:style-name="ce22">
            <text:p>For charting</text:p>
          </table:table-cell>
          <table:table-cell table:number-columns-repeated="4" table:style-name="ce22"/>
          <table:table-cell table:number-columns-repeated="7" table:style-name="ce3"/>
          <table:table-cell table:number-columns-repeated="16372"/>
        </table:table-row>
        <table:table-row table:style-name="ro2">
          <table:table-cell table:number-columns-repeated="2" table:style-name="ce22"/>
          <table:table-cell office:value-type="string" table:number-columns-spanned="2" table:number-rows-spanned="1" table:style-name="ce26">
            <text:p>Events per second</text:p>
          </table:table-cell>
          <table:covered-table-cell/>
          <table:table-cell table:style-name="ce23"/>
          <table:table-cell table:style-name="ce3"/>
          <table:table-cell table:style-name="ce22"/>
          <table:table-cell office:value-type="string" table:number-columns-spanned="2" table:number-rows-spanned="1" table:style-name="ce26">
            <text:p>Events per second</text:p>
          </table:table-cell>
          <table:covered-table-cell/>
          <table:table-cell table:number-columns-repeated="3" table:style-name="ce3"/>
          <table:table-cell table:number-columns-repeated="16372"/>
        </table:table-row>
        <table:table-row table:style-name="ro2">
          <table:table-cell table:number-columns-repeated="2" table:style-name="ce22"/>
          <table:table-cell office:value-type="string" office:string-value="SimPy" table:formula="of:=[.A4]" table:style-name="ce22">
            <text:p>SimPy</text:p>
          </table:table-cell>
          <table:table-cell office:value-type="string" table:style-name="ce22">
            <text:p>Cimba Python</text:p>
          </table:table-cell>
          <table:table-cell office:value-type="string" office:string-value="Cimba" table:formula="of:=[.C4]" table:style-name="ce22">
            <text:p>Cimba</text:p>
          </table:table-cell>
          <table:table-cell table:style-name="ce3"/>
          <table:table-cell table:style-name="ce22"/>
          <table:table-cell office:value-type="string" office:string-value="SimPy" table:formula="of:=[.D4]" table:style-name="ce22">
            <text:p>SimPy</text:p>
          </table:table-cell>
          <table:table-cell office:value-type="string" table:style-name="ce22">
            <text:p>Cimba Python</text:p>
          </table:table-cell>
          <table:table-cell office:value-type="string" office:string-value="Cimba" table:formula="of:=[.F4]" table:style-name="ce24">
            <text:p>Cimba</text:p>
          </table:table-cell>
          <table:table-cell table:number-columns-repeated="2" table:style-name="ce3"/>
          <table:table-cell table:number-columns-repeated="16372"/>
        </table:table-row>
        <table:table-row table:style-name="ro2">
          <table:table-cell office:value-type="string" office:string-value="Single core, single trial" table:formula="of:=[.A3]" table:style-name="ce22">
            <text:p>Single core, single trial</text:p>
          </table:table-cell>
          <table:table-cell table:style-name="ce22"/>
          <table:table-cell office:value-type="float" office:value="1531362.1549961912" table:formula="of:=[.A16]" table:style-name="ce24">
            <text:p>1.53E+06</text:p>
          </table:table-cell>
          <table:table-cell office:value-type="float" office:value="41876021.956179827" table:formula="of:=[.B16]" table:style-name="ce24">
            <text:p>4.19E+07</text:p>
          </table:table-cell>
          <table:table-cell office:value-type="float" office:value="48222788.201300554" table:formula="of:=[.C16]" table:style-name="ce24">
            <text:p>4.82E+07</text:p>
          </table:table-cell>
          <table:table-cell table:style-name="ce3"/>
          <table:table-cell office:value-type="string" office:string-value="Multicore, 100 trials" table:formula="of:=[.D3]" table:style-name="ce22">
            <text:p>Multicore, 100 trials</text:p>
          </table:table-cell>
          <table:table-cell office:value-type="float" office:value="10867608.630320858" table:formula="of:=[.D16]" table:style-name="ce24">
            <text:p>1.09E+07</text:p>
          </table:table-cell>
          <table:table-cell office:value-type="float" office:value="353726734.97800481" table:formula="of:=[.E16]" table:style-name="ce24">
            <text:p>3.54E+08</text:p>
          </table:table-cell>
          <table:table-cell office:value-type="float" office:value="412280984.830486" table:formula="of:=[.F16]" table:style-name="ce24">
            <text:p>4.12E+08</text:p>
          </table:table-cell>
          <table:table-cell table:number-columns-repeated="2" table:style-name="ce3"/>
          <table:table-cell table:number-columns-repeated="16372"/>
        </table:table-row>
        <table:table-row table:style-name="ro2">
          <table:table-cell table:number-columns-repeated="12" table:style-name="ce3"/>
          <table:table-cell table:number-columns-repeated="16372"/>
        </table:table-row>
        <table:table-row table:style-name="ro2">
          <table:table-cell table:number-columns-repeated="7" table:style-name="ce3"/>
          <table:table-cell table:style-name="ce3">
            <draw:frame draw:z-index="2" draw:id="id1" draw:style-name="a1" draw:name="Chart 2" svg:x="1.1295in" svg:y="0.0114in" svg:width="6.2988in" svg:height="3.542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 table:style-name="ce3"/>
          <table:table-cell table:number-columns-repeated="16372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Nimbus Sans" svg:font-family="&quot;Nimbus Sans&quot;"/>
    <style:font-face style:name="JetBrains Mono" svg:font-family="&quot;JetBrains Mono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number:percentage-style style:name="N38">
      <number:number number:decimal-places="1" number:min-decimal-places="1" number:min-integer-digits="1"/>
      <number:text>%</number:text>
    </number:percentag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Fran</dc:creator>
    <meta:creation-date>2026-01-05T16:44:19Z</meta:creation-date>
    <dc:date>2026-05-22T21:57:30Z</dc:date>
    <meta:editing-cycles>8</meta:editing-cycles>
    <meta:editing-duration>PT3137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scientific-number number:decimal-places="0" number:min-decimal-places="0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c5c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138c0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00a0fc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vents processed per second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.$A$34"/>
          </chart:axis>
          <chart:series chart:label-cell-address="Sheet1.$C$33" chart:values-cell-range-address="Sheet1.$C$34" chart:class="chart:bar" chart:attached-axis="primary-y" chart:style-name="G0S0">
            <chart:data-label chart:style-name="DL00"/>
            <chart:data-point/>
          </chart:series>
          <chart:series chart:label-cell-address="Sheet1.$D$33" chart:values-cell-range-address="Sheet1.$D$34" chart:class="chart:bar" chart:attached-axis="primary-y" chart:style-name="G0S1">
            <chart:data-label chart:style-name="DL01"/>
            <chart:data-point chart:style-name="G0S1P0">
              <chart:data-label chart:style-name="DL010"/>
            </chart:data-point>
          </chart:series>
          <chart:series chart:label-cell-address="Sheet1.$E$33" chart:values-cell-range-address="Sheet1.$E$34" chart:class="chart:bar" chart:attached-axis="primary-y" chart:style-name="G0S2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scientific-number number:decimal-places="0" number:min-decimal-places="0" number:min-integer-digits="1" number:min-exponent-digits="2" number:exponent-interval="1" number:forced-exponent-sign="true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fc5c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00a0f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G$34"/>
          </chart:axis>
          <chart:series chart:label-cell-address="Sheet1.$H$33" chart:values-cell-range-address="Sheet1.$H$34" chart:class="chart:bar" chart:attached-axis="primary-y" chart:style-name="G0S0">
            <chart:data-label chart:style-name="DL00"/>
            <chart:data-point/>
          </chart:series>
          <chart:series chart:label-cell-address="Sheet1.$I$33" chart:values-cell-range-address="Sheet1.$I$34" chart:class="chart:bar" chart:attached-axis="primary-y" chart:style-name="G0S1">
            <chart:data-label chart:style-name="DL01"/>
            <chart:data-point/>
          </chart:series>
          <chart:series chart:label-cell-address="Sheet1.$J$33" chart:values-cell-range-address="Sheet1.$J$34" chart:class="chart:bar" chart:attached-axis="primary-y" chart:style-name="G0S2"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