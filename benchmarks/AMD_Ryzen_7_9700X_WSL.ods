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Nimbus Sans" svg:font-family="&quot;Nimbus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color="#000000" style:font-name="JetBrains Mono" style:font-name-asian="JetBrains Mono" style:font-name-complex="JetBrains Mono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5" style:family="table-cell" style:parent-style-name="Default" style:data-style-name="N15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37"/>
    <style:style style:name="ce17" style:family="table-cell" style:parent-style-name="Default" style:data-style-name="N13"/>
    <style:style style:name="ce18" style:family="table-cell" style:parent-style-name="Default" style:data-style-name="N38"/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ext-properties fo:color="#80808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/>
    </style:style>
    <style:style style:name="ce24" style:family="table-cell" style:parent-style-name="Default" style:data-style-name="N15">
      <style:text-properties fo:color="#808080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/>
      <style:text-properties style:text-underline-style="solid" style:text-underline-type="single"/>
    </style:style>
    <style:style style:name="ce28" style:family="table-cell" style:parent-style-name="Default" style:data-style-name="N0"/>
    <style:style style:name="ce29" style:family="table-cell" style:parent-style-name="Default" style:data-style-name="N37"/>
    <style:style style:name="ce30" style:family="table-cell" style:parent-style-name="Default" style:data-style-name="N14"/>
    <style:style style:name="ce31" style:family="table-cell" style:parent-style-name="Default" style:data-style-name="N38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.026in" svg:y="6.2311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Runtime for benchmarks (seconds)</text:p>
          </table:table-cell>
          <table:table-cell table:style-name="ce2"/>
          <table:table-cell table:number-columns-repeated="10" table:style-name="ce3"/>
          <table:table-cell table:number-columns-repeated="16372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table:number-columns-repeated="16372"/>
        </table:table-row>
        <table:table-row table:style-name="ro2">
          <table:table-cell office:value-type="string" table:number-columns-spanned="3" table:number-rows-spanned="1" table:style-name="ce25">
            <text:p>Single core, single trial</text:p>
          </table:table-cell>
          <table:covered-table-cell table:number-columns-repeated="2"/>
          <table:table-cell office:value-type="string" table:number-columns-spanned="3" table:number-rows-spanned="1" table:style-name="ce25">
            <text:p>Multicore, 100 trials</text:p>
          </table:table-cell>
          <table:covered-table-cell table:number-columns-repeated="2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">
            <text:p>SimPy</text:p>
          </table:table-cell>
          <table:table-cell office:value-type="string" table:style-name="ce3">
            <text:p>Cimba Python</text:p>
          </table:table-cell>
          <table:table-cell office:value-type="string" table:style-name="ce3">
            <text:p>Cimba</text:p>
          </table:table-cell>
          <table:table-cell office:value-type="string" table:style-name="ce3">
            <text:p>SimPy</text:p>
          </table:table-cell>
          <table:table-cell office:value-type="string" table:style-name="ce3">
            <text:p>Cimba Python</text:p>
          </table:table-cell>
          <table:table-cell office:value-type="string" table:style-name="ce3">
            <text:p>Cimba</text:p>
          </table:table-cell>
          <table:table-cell table:number-columns-repeated="4" table:style-name="ce3"/>
          <table:table-cell office:value-type="string" table:style-name="ce3">
            <text:p>Compiler:</text:p>
          </table:table-cell>
          <table:table-cell office:value-type="string" table:style-name="ce3">
            <text:p>gcc</text:p>
          </table:table-cell>
          <table:table-cell table:number-columns-repeated="16372"/>
        </table:table-row>
        <table:table-row table:style-name="ro2">
          <table:table-cell office:value-type="float" office:value="3.5115108900063201" table:style-name="ce3">
            <text:p>3.51151089</text:p>
          </table:table-cell>
          <table:table-cell office:value-type="float" office:value="0.36820025500492198" table:style-name="ce3">
            <text:p>0.368200255</text:p>
          </table:table-cell>
          <table:table-cell office:value-type="float" office:value="9.1333203003159696E-2" table:style-name="ce3">
            <text:p>0.091333203</text:p>
          </table:table-cell>
          <table:table-cell office:value-type="float" office:value="42.503721036002403" table:style-name="ce3">
            <text:p>42.50372104</text:p>
          </table:table-cell>
          <table:table-cell office:value-type="float" office:value="4.7283651619945903" table:style-name="ce3">
            <text:p>4.728365162</text:p>
          </table:table-cell>
          <table:table-cell office:value-type="float" office:value="1.2895637469919199" table:style-name="ce3">
            <text:p>1.289563747</text:p>
          </table:table-cell>
          <table:table-cell table:number-columns-repeated="4" table:style-name="ce3"/>
          <table:table-cell office:value-type="string" table:style-name="ce3">
            <text:p>Flags:</text:p>
          </table:table-cell>
          <table:table-cell office:value-type="string" table:style-name="ce5">
            <text:p>-Wno-pedantic</text:p>
          </table:table-cell>
          <table:table-cell table:number-columns-repeated="16372"/>
        </table:table-row>
        <table:table-row table:style-name="ro2">
          <table:table-cell office:value-type="float" office:value="3.2447566690098002" table:style-name="ce3">
            <text:p>3.244756669</text:p>
          </table:table-cell>
          <table:table-cell office:value-type="float" office:value="0.36533738000434801" table:style-name="ce3">
            <text:p>0.36533738</text:p>
          </table:table-cell>
          <table:table-cell office:value-type="float" office:value="9.3996305004111505E-2" table:style-name="ce3">
            <text:p>0.093996305</text:p>
          </table:table-cell>
          <table:table-cell office:value-type="float" office:value="44.145352551000499" table:style-name="ce3">
            <text:p>44.14535255</text:p>
          </table:table-cell>
          <table:table-cell office:value-type="float" office:value="4.4440775690018199" table:style-name="ce3">
            <text:p>4.444077569</text:p>
          </table:table-cell>
          <table:table-cell office:value-type="float" office:value="1.1923025410069401" table:style-name="ce3">
            <text:p>1.192302541</text:p>
          </table:table-cell>
          <table:table-cell table:number-columns-repeated="5" table:style-name="ce3"/>
          <table:table-cell office:value-type="string" table:style-name="ce5">
            <text:p>-D_POSIX_C_SOURCE=200809L</text:p>
          </table:table-cell>
          <table:table-cell table:number-columns-repeated="16372"/>
        </table:table-row>
        <table:table-row table:style-name="ro2">
          <table:table-cell office:value-type="float" office:value="3.5494542220112599" table:style-name="ce3">
            <text:p>3.549454222</text:p>
          </table:table-cell>
          <table:table-cell office:value-type="float" office:value="0.37172233599994797" table:style-name="ce3">
            <text:p>0.371722336</text:p>
          </table:table-cell>
          <table:table-cell office:value-type="float" office:value="9.2199591992539395E-2" table:style-name="ce3">
            <text:p>0.092199592</text:p>
          </table:table-cell>
          <table:table-cell office:value-type="float" office:value="41.010008369994502" table:style-name="ce3">
            <text:p>41.01000837</text:p>
          </table:table-cell>
          <table:table-cell office:value-type="float" office:value="4.8619349460059302" table:style-name="ce3">
            <text:p>4.861934946</text:p>
          </table:table-cell>
          <table:table-cell office:value-type="float" office:value="1.11846855499607" table:style-name="ce3">
            <text:p>1.118468555</text:p>
          </table:table-cell>
          <table:table-cell table:number-columns-repeated="5" table:style-name="ce3"/>
          <table:table-cell office:value-type="string" table:style-name="ce5">
            <text:p>-fno-semantic-interposition</text:p>
          </table:table-cell>
          <table:table-cell table:number-columns-repeated="16372"/>
        </table:table-row>
        <table:table-row table:style-name="ro2">
          <table:table-cell office:value-type="float" office:value="3.2712567740090899" table:style-name="ce3">
            <text:p>3.271256774</text:p>
          </table:table-cell>
          <table:table-cell office:value-type="float" office:value="0.35745098799816299" table:style-name="ce3">
            <text:p>0.357450988</text:p>
          </table:table-cell>
          <table:table-cell office:value-type="float" office:value="9.7946262991172303E-2" table:style-name="ce3">
            <text:p>0.097946263</text:p>
          </table:table-cell>
          <table:table-cell office:value-type="float" office:value="42.054319375995" table:style-name="ce3">
            <text:p>42.05431938</text:p>
          </table:table-cell>
          <table:table-cell office:value-type="float" office:value="4.8231652210088196" table:style-name="ce3">
            <text:p>4.823165221</text:p>
          </table:table-cell>
          <table:table-cell office:value-type="float" office:value="1.14965185199981" table:style-name="ce3">
            <text:p>1.149651852</text:p>
          </table:table-cell>
          <table:table-cell table:style-name="ce3"/>
          <table:table-cell office:value-type="string" table:style-name="ce6">
            <text:p>Events per object</text:p>
          </table:table-cell>
          <table:table-cell office:value-type="float" office:value="4" table:style-name="ce7">
            <text:p>4</text:p>
          </table:table-cell>
          <table:table-cell table:number-columns-repeated="2" table:style-name="ce3"/>
          <table:table-cell office:value-type="string" table:style-name="ce5">
            <text:p>-fprofile-use</text:p>
          </table:table-cell>
          <table:table-cell table:number-columns-repeated="16372"/>
        </table:table-row>
        <table:table-row table:style-name="ro2">
          <table:table-cell office:value-type="float" office:value="3.0955990789952899" table:style-name="ce3">
            <text:p>3.095599079</text:p>
          </table:table-cell>
          <table:table-cell office:value-type="float" office:value="0.35930809499404898" table:style-name="ce3">
            <text:p>0.359308095</text:p>
          </table:table-cell>
          <table:table-cell office:value-type="float" office:value="9.9267614990821998E-2" table:style-name="ce3">
            <text:p>0.099267615</text:p>
          </table:table-cell>
          <table:table-cell office:value-type="float" office:value="43.156554881003103" table:style-name="ce3">
            <text:p>43.15655488</text:p>
          </table:table-cell>
          <table:table-cell office:value-type="float" office:value="4.5172984539967702" table:style-name="ce3">
            <text:p>4.517298454</text:p>
          </table:table-cell>
          <table:table-cell office:value-type="float" office:value="1.16177654800413" table:style-name="ce3">
            <text:p>1.161776548</text:p>
          </table:table-cell>
          <table:table-cell table:style-name="ce3"/>
          <table:table-cell office:value-type="string" table:style-name="ce8">
            <text:p>Objects per trial</text:p>
          </table:table-cell>
          <table:table-cell office:value-type="float" office:value="1000000" table:style-name="ce9">
            <text:p>1000000</text:p>
          </table:table-cell>
          <table:table-cell table:number-columns-repeated="2" table:style-name="ce3"/>
          <table:table-cell office:value-type="string" table:style-name="ce5">
            <text:p>-fprofile-correction</text:p>
          </table:table-cell>
          <table:table-cell table:number-columns-repeated="16372"/>
        </table:table-row>
        <table:table-row table:style-name="ro2">
          <table:table-cell office:value-type="float" office:value="3.0973441910027799" table:style-name="ce3">
            <text:p>3.097344191</text:p>
          </table:table-cell>
          <table:table-cell office:value-type="float" office:value="0.406345855997643" table:style-name="ce3">
            <text:p>0.406345856</text:p>
          </table:table-cell>
          <table:table-cell office:value-type="float" office:value="9.7069159004604402E-2" table:style-name="ce3">
            <text:p>0.097069159</text:p>
          </table:table-cell>
          <table:table-cell office:value-type="float" office:value="42.453109573994901" table:style-name="ce3">
            <text:p>42.45310957</text:p>
          </table:table-cell>
          <table:table-cell office:value-type="float" office:value="4.4695083589904199" table:style-name="ce3">
            <text:p>4.469508359</text:p>
          </table:table-cell>
          <table:table-cell office:value-type="float" office:value="1.2700641400006101" table:style-name="ce3">
            <text:p>1.27006414</text:p>
          </table:table-cell>
          <table:table-cell table:style-name="ce3"/>
          <table:table-cell office:value-type="string" table:style-name="ce10">
            <text:p>Events per trial</text:p>
          </table:table-cell>
          <table:table-cell office:value-type="float" office:value="4000000" table:formula="of:=[.I8]*[.I9]" table:style-name="ce11">
            <text:p>4000000</text:p>
          </table:table-cell>
          <table:table-cell table:number-columns-repeated="2" table:style-name="ce3"/>
          <table:table-cell office:value-type="string" table:style-name="ce5">
            <text:p>-O3</text:p>
          </table:table-cell>
          <table:table-cell table:number-columns-repeated="16372"/>
        </table:table-row>
        <table:table-row table:style-name="ro2">
          <table:table-cell office:value-type="float" office:value="2.9392578429978999" table:style-name="ce3">
            <text:p>2.939257843</text:p>
          </table:table-cell>
          <table:table-cell office:value-type="float" office:value="0.39103179700032298" table:style-name="ce3">
            <text:p>0.391031797</text:p>
          </table:table-cell>
          <table:table-cell office:value-type="float" office:value="9.2633437001495594E-2" table:style-name="ce3">
            <text:p>0.092633437</text:p>
          </table:table-cell>
          <table:table-cell office:value-type="float" office:value="40.075018174000398" table:style-name="ce3">
            <text:p>40.07501817</text:p>
          </table:table-cell>
          <table:table-cell office:value-type="float" office:value="4.5785056430031501" table:style-name="ce3">
            <text:p>4.578505643</text:p>
          </table:table-cell>
          <table:table-cell office:value-type="float" office:value="1.1910480319929799" table:style-name="ce3">
            <text:p>1.191048032</text:p>
          </table:table-cell>
          <table:table-cell table:style-name="ce3"/>
          <table:table-cell office:value-type="string" table:style-name="ce8">
            <text:p>Number of trials</text:p>
          </table:table-cell>
          <table:table-cell office:value-type="float" office:value="100" table:style-name="ce12">
            <text:p>100</text:p>
          </table:table-cell>
          <table:table-cell table:number-columns-repeated="2" table:style-name="ce3"/>
          <table:table-cell office:value-type="string" table:style-name="ce5">
            <text:p>-DNDEBUG</text:p>
          </table:table-cell>
          <table:table-cell table:number-columns-repeated="16372"/>
        </table:table-row>
        <table:table-row table:style-name="ro2">
          <table:table-cell office:value-type="float" office:value="2.97850746900076" table:style-name="ce3">
            <text:p>2.978507469</text:p>
          </table:table-cell>
          <table:table-cell office:value-type="float" office:value="0.37341194899636299" table:style-name="ce3">
            <text:p>0.373411949</text:p>
          </table:table-cell>
          <table:table-cell office:value-type="float" office:value="9.4468422001227695E-2" table:style-name="ce3">
            <text:p>0.094468422</text:p>
          </table:table-cell>
          <table:table-cell office:value-type="float" office:value="40.7936602949922" table:style-name="ce3">
            <text:p>40.79366029</text:p>
          </table:table-cell>
          <table:table-cell office:value-type="float" office:value="4.6114106010063596" table:style-name="ce3">
            <text:p>4.611410601</text:p>
          </table:table-cell>
          <table:table-cell office:value-type="float" office:value="1.1437990080012199" table:style-name="ce3">
            <text:p>1.143799008</text:p>
          </table:table-cell>
          <table:table-cell table:style-name="ce3"/>
          <table:table-cell office:value-type="string" table:style-name="ce10">
            <text:p>Total events</text:p>
          </table:table-cell>
          <table:table-cell office:value-type="float" office:value="400000000" table:formula="of:=[.I10]*[.I11]" table:style-name="ce11">
            <text:p>400000000</text:p>
          </table:table-cell>
          <table:table-cell table:number-columns-repeated="2" table:style-name="ce3"/>
          <table:table-cell office:value-type="string" table:style-name="ce5">
            <text:p>-DNLOGINFO</text:p>
          </table:table-cell>
          <table:table-cell table:number-columns-repeated="16372"/>
        </table:table-row>
        <table:table-row table:style-name="ro2">
          <table:table-cell office:value-type="float" office:value="3.1041977629938602" table:style-name="ce3">
            <text:p>3.104197763</text:p>
          </table:table-cell>
          <table:table-cell office:value-type="float" office:value="0.38245718101097698" table:style-name="ce3">
            <text:p>0.382457181</text:p>
          </table:table-cell>
          <table:table-cell office:value-type="float" office:value="9.2438280000351397E-2" table:style-name="ce3">
            <text:p>0.09243828</text:p>
          </table:table-cell>
          <table:table-cell office:value-type="float" office:value="40.8632008699933" table:style-name="ce3">
            <text:p>40.86320087</text:p>
          </table:table-cell>
          <table:table-cell office:value-type="float" office:value="4.7418682120041904" table:style-name="ce3">
            <text:p>4.741868212</text:p>
          </table:table-cell>
          <table:table-cell office:value-type="float" office:value="1.16492193700105" table:style-name="ce3">
            <text:p>1.164921937</text:p>
          </table:table-cell>
          <table:table-cell table:number-columns-repeated="5" table:style-name="ce3"/>
          <table:table-cell office:value-type="string" table:style-name="ce5">
            <text:p>-DNASSERT</text:p>
          </table:table-cell>
          <table:table-cell table:number-columns-repeated="16372"/>
        </table:table-row>
        <table:table-row table:style-name="ro2">
          <table:table-cell office:value-type="float" office:value="3.0549539610074099" table:style-name="ce3">
            <text:p>3.054953961</text:p>
          </table:table-cell>
          <table:table-cell office:value-type="float" office:value="0.36974694600212399" table:style-name="ce3">
            <text:p>0.369746946</text:p>
          </table:table-cell>
          <table:table-cell office:value-type="float" office:value="9.3746062993886894E-2" table:style-name="ce3">
            <text:p>0.093746063</text:p>
          </table:table-cell>
          <table:table-cell office:value-type="float" office:value="41.148029333999197" table:style-name="ce3">
            <text:p>41.14802933</text:p>
          </table:table-cell>
          <table:table-cell office:value-type="float" office:value="5.2056733950012104" table:style-name="ce3">
            <text:p>5.205673395</text:p>
          </table:table-cell>
          <table:table-cell office:value-type="float" office:value="1.09929316600028" table:style-name="ce3">
            <text:p>1.099293166</text:p>
          </table:table-cell>
          <table:table-cell table:number-columns-repeated="5" table:style-name="ce3"/>
          <table:table-cell office:value-type="string" table:style-name="ce5">
            <text:p>-DNMXCSR</text:p>
          </table:table-cell>
          <table:table-cell table:number-columns-repeated="16372"/>
        </table:table-row>
        <table:table-row table:style-name="ro2">
          <table:table-cell office:value-type="float" office:value="3.1846838861034468" table:formula="of:=AVERAGE([.A5:.A14])" table:style-name="ce14">
            <text:p>3.185</text:p>
          </table:table-cell>
          <table:table-cell office:value-type="float" office:value="0.37450127830088598" table:formula="of:=AVERAGE([.B5:.B14])" table:style-name="ce14">
            <text:p>0.375</text:p>
          </table:table-cell>
          <table:table-cell office:value-type="float" office:value="9.4509833898337087E-2" table:formula="of:=AVERAGE([.C5:.C14])" table:style-name="ce14">
            <text:p>0.095</text:p>
          </table:table-cell>
          <table:table-cell office:value-type="float" office:value="41.820297446097548" table:formula="of:=AVERAGE([.D5:.D14])" table:style-name="ce14">
            <text:p>41.820</text:p>
          </table:table-cell>
          <table:table-cell office:value-type="float" office:value="4.6981807562013262" table:formula="of:=AVERAGE([.E5:.E14])" table:style-name="ce14">
            <text:p>4.698</text:p>
          </table:table-cell>
          <table:table-cell office:value-type="float" office:value="1.1780889525995009" table:formula="of:=AVERAGE([.F5:.F14])" table:style-name="ce14">
            <text:p>1.178</text:p>
          </table:table-cell>
          <table:table-cell office:value-type="string" table:style-name="ce3">
            <text:p>Avg (s)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float" office:value="1256011.6303706728" table:formula="of:=[.I10]/[.A15]" table:style-name="ce15">
            <text:p>1.26E+06</text:p>
          </table:table-cell>
          <table:table-cell office:value-type="float" office:value="10680871.419579711" table:formula="of:=[.I10]/[.B15]" table:style-name="ce15">
            <text:p>1.07E+07</text:p>
          </table:table-cell>
          <table:table-cell office:value-type="float" office:value="42323638.028003991" table:formula="of:=[.I10]/[.C15]" table:style-name="ce15">
            <text:p>4.23E+07</text:p>
          </table:table-cell>
          <table:table-cell office:value-type="float" office:value="9564733.5008930191" table:formula="of:=[.I12]/[.D15]" table:style-name="ce15">
            <text:p>9.56E+06</text:p>
          </table:table-cell>
          <table:table-cell office:value-type="float" office:value="85139338.130407855" table:formula="of:=[.I12]/[.E15]" table:style-name="ce15">
            <text:p>8.51E+07</text:p>
          </table:table-cell>
          <table:table-cell office:value-type="float" office:value="339532935.19762141" table:formula="of:=[.I12]/[.F15]" table:style-name="ce15">
            <text:p>3.40E+08</text:p>
          </table:table-cell>
          <table:table-cell office:value-type="string" table:style-name="ce3">
            <text:p>Avg (ev/s)</text:p>
          </table:table-cell>
          <table:table-cell table:number-columns-repeated="3" table:style-name="ce3"/>
          <table:table-cell office:value-type="string" table:style-name="ce3">
            <text:p>Compiler:</text:p>
          </table:table-cell>
          <table:table-cell office:value-type="string" table:style-name="ce3">
            <text:p>gcc 13.3.0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8.5037997748695879" table:formula="of:=[.A15]/[.B15]" table:style-name="ce29">
            <text:p>8.5</text:p>
          </table:table-cell>
          <table:table-cell office:value-type="float" office:value="33.696852007264837" table:formula="of:=[.A15]/[.C15]" table:style-name="ce16">
            <text:p>33.7</text:p>
          </table:table-cell>
          <table:table-cell table:style-name="ce3"/>
          <table:table-cell office:value-type="float" office:value="8.9013811124438291" table:formula="of:=[.D15]/[.E15]" table:style-name="ce16">
            <text:p>8.9</text:p>
          </table:table-cell>
          <table:table-cell office:value-type="float" office:value="35.498420856777727" table:formula="of:=[.D15]/[.F15]" table:style-name="ce16">
            <text:p>35.5</text:p>
          </table:table-cell>
          <table:table-cell office:value-type="string" table:style-name="ce3">
            <text:p>Speedup factor</text:p>
          </table:table-cell>
          <table:table-cell table:number-columns-repeated="3" table:style-name="ce3"/>
          <table:table-cell office:value-type="string" table:style-name="ce3">
            <text:p>Python:</text:p>
          </table:table-cell>
          <table:table-cell office:value-type="string" table:style-name="ce3">
            <text:p>Python 3.13.5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percentage" office:value="7.503799774869587" table:formula="of:=([.B16]-[.A16])/[.A16]" table:style-name="ce31">
            <text:p>750.4%</text:p>
          </table:table-cell>
          <table:table-cell office:value-type="percentage" office:value="32.696852007264837" table:formula="of:=([.C16]-[.A16])/[.A16]" table:style-name="ce17">
            <text:p>3270%</text:p>
          </table:table-cell>
          <table:table-cell table:style-name="ce3"/>
          <table:table-cell office:value-type="percentage" office:value="7.9013811124438291" table:formula="of:=([.E16]-[.D16])/[.D16]" table:style-name="ce17">
            <text:p>790%</text:p>
          </table:table-cell>
          <table:table-cell office:value-type="percentage" office:value="34.498420856777727" table:formula="of:=([.F16]-[.D16])/[.D16]" table:style-name="ce17">
            <text:p>3450%</text:p>
          </table:table-cell>
          <table:table-cell office:value-type="string" table:style-name="ce3">
            <text:p>Percent more events per second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style-name="ce3"/>
          <table:table-cell office:value-type="percentage" office:value="-0.88240550971635079" table:formula="of:=([.B15]-[.A15])/[.A15]" table:style-name="ce30">
            <text:p>-88.24%</text:p>
          </table:table-cell>
          <table:table-cell office:value-type="percentage" office:value="-0.97032363735982208" table:formula="of:=([.C15]-[.A15])/[.A15]" table:style-name="ce18">
            <text:p>-97.0%</text:p>
          </table:table-cell>
          <table:table-cell table:style-name="ce3"/>
          <table:table-cell office:value-type="percentage" office:value="-0.88765788281977576" table:formula="of:=([.E15]-[.D15])/[.D15]" table:style-name="ce18">
            <text:p>-88.8%</text:p>
          </table:table-cell>
          <table:table-cell office:value-type="percentage" office:value="-0.97182973282009888" table:formula="of:=([.F15]-[.D15])/[.D15]" table:style-name="ce18">
            <text:p>-97.2%</text:p>
          </table:table-cell>
          <table:table-cell office:value-type="string" table:style-name="ce3">
            <text:p>Percent shorter run time</text:p>
          </table:table-cell>
          <table:table-cell table:number-columns-repeated="5" table:style-name="ce3"/>
          <table:table-cell table:number-columns-repeated="16372"/>
        </table:table-row>
        <table:table-row table:number-rows-repeated="2" table:style-name="ro2">
          <table:table-cell table:number-columns-repeated="12" table:style-name="ce3"/>
          <table:table-cell table:number-columns-repeated="16372"/>
        </table:table-row>
        <table:table-row table:style-name="ro2">
          <table:table-cell office:value-type="string" table:style-name="ce19">
            <text:p>System information</text:p>
          </table:table-cell>
          <table:table-cell table:style-name="ce27"/>
          <table:table-cell table:number-columns-repeated="4" table:style-name="ce4"/>
          <table:table-cell table:style-name="ce7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OS</text:p>
          </table:table-cell>
          <table:table-cell table:style-name="ce28"/>
          <table:table-cell office:value-type="string" table:style-name="ce3">
            <text:p>WSL Ubuntu 24.04 on Microsoft hypervisor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Motherboard</text:p>
          </table:table-cell>
          <table:table-cell table:style-name="ce28"/>
          <table:table-cell office:value-type="string" table:style-name="ce3">
            <text:p><text:s/>ASUS PRIME X670E-PRO WIFI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CPU</text:p>
          </table:table-cell>
          <table:table-cell table:style-name="ce28"/>
          <table:table-cell office:value-type="string" table:style-name="ce3">
            <text:p>AMD Ryzen 7 9700X 8-Core Processor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RAM</text:p>
          </table:table-cell>
          <table:table-cell table:style-name="ce28"/>
          <table:table-cell office:value-type="string" table:style-name="ce3">
            <text:p>96.0 GiB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Disk</text:p>
          </table:table-cell>
          <table:table-cell table:style-name="ce28"/>
          <table:table-cell office:value-type="string" table:style-name="ce3">
            <text:p>2.0 TB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table:style-name="ce8"/>
          <table:table-cell table:style-name="ce28"/>
          <table:table-cell table:number-columns-repeated="4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20">
            <text:p>All times collected as `time &lt;command&gt;` in terminal, real time only</text:p>
          </table:table-cell>
          <table:table-cell table:number-columns-repeated="5" table:style-name="ce13"/>
          <table:table-cell table:style-name="ce21"/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12" table:style-name="ce3"/>
          <table:table-cell table:number-columns-repeated="16372"/>
        </table:table-row>
        <table:table-row table:style-name="ro2">
          <table:table-cell office:value-type="string" table:style-name="ce22">
            <text:p>For charting</text:p>
          </table:table-cell>
          <table:table-cell table:number-columns-repeated="4" table:style-name="ce22"/>
          <table:table-cell table:number-columns-repeated="7" table:style-name="ce3"/>
          <table:table-cell table:number-columns-repeated="16372"/>
        </table:table-row>
        <table:table-row table:style-name="ro2">
          <table:table-cell table:number-columns-repeated="2" table:style-name="ce22"/>
          <table:table-cell office:value-type="string" table:number-columns-spanned="2" table:number-rows-spanned="1" table:style-name="ce26">
            <text:p>Events per second</text:p>
          </table:table-cell>
          <table:covered-table-cell/>
          <table:table-cell table:style-name="ce23"/>
          <table:table-cell table:style-name="ce3"/>
          <table:table-cell table:style-name="ce22"/>
          <table:table-cell office:value-type="string" table:number-columns-spanned="2" table:number-rows-spanned="1" table:style-name="ce26">
            <text:p>Events per second</text:p>
          </table:table-cell>
          <table:covered-table-cell/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2" table:style-name="ce22"/>
          <table:table-cell office:value-type="string" office:string-value="SimPy" table:formula="of:=[.A4]" table:style-name="ce22">
            <text:p>SimPy</text:p>
          </table:table-cell>
          <table:table-cell office:value-type="string" table:style-name="ce22">
            <text:p>Cimba Python</text:p>
          </table:table-cell>
          <table:table-cell office:value-type="string" office:string-value="Cimba" table:formula="of:=[.C4]" table:style-name="ce22">
            <text:p>Cimba</text:p>
          </table:table-cell>
          <table:table-cell table:style-name="ce3"/>
          <table:table-cell table:style-name="ce22"/>
          <table:table-cell office:value-type="string" office:string-value="SimPy" table:formula="of:=[.D4]" table:style-name="ce22">
            <text:p>SimPy</text:p>
          </table:table-cell>
          <table:table-cell office:value-type="string" table:style-name="ce22">
            <text:p>Cimba Python</text:p>
          </table:table-cell>
          <table:table-cell office:value-type="string" office:string-value="Cimba" table:formula="of:=[.F4]" table:style-name="ce24">
            <text:p>Cimba</text:p>
          </table:table-cell>
          <table:table-cell table:number-columns-repeated="2" table:style-name="ce3"/>
          <table:table-cell table:number-columns-repeated="16372"/>
        </table:table-row>
        <table:table-row table:style-name="ro2">
          <table:table-cell office:value-type="string" office:string-value="Single core, single trial" table:formula="of:=[.A3]" table:style-name="ce22">
            <text:p>Single core, single trial</text:p>
          </table:table-cell>
          <table:table-cell table:style-name="ce22"/>
          <table:table-cell office:value-type="float" office:value="1256011.6303706728" table:formula="of:=[.A16]" table:style-name="ce24">
            <text:p>1.26E+06</text:p>
          </table:table-cell>
          <table:table-cell office:value-type="float" office:value="10680871.419579711" table:formula="of:=[.B16]" table:style-name="ce24">
            <text:p>1.07E+07</text:p>
          </table:table-cell>
          <table:table-cell office:value-type="float" office:value="42323638.028003991" table:formula="of:=[.C16]" table:style-name="ce24">
            <text:p>4.23E+07</text:p>
          </table:table-cell>
          <table:table-cell table:style-name="ce3"/>
          <table:table-cell office:value-type="string" office:string-value="Multicore, 100 trials" table:formula="of:=[.D3]" table:style-name="ce22">
            <text:p>Multicore, 100 trials</text:p>
          </table:table-cell>
          <table:table-cell office:value-type="float" office:value="9564733.5008930191" table:formula="of:=[.D16]" table:style-name="ce24">
            <text:p>9.56E+06</text:p>
          </table:table-cell>
          <table:table-cell office:value-type="float" office:value="85139338.130407855" table:formula="of:=[.E16]" table:style-name="ce24">
            <text:p>8.51E+07</text:p>
          </table:table-cell>
          <table:table-cell office:value-type="float" office:value="339532935.19762141" table:formula="of:=[.F16]" table:style-name="ce24">
            <text:p>3.40E+08</text:p>
          </table:table-cell>
          <table:table-cell table:number-columns-repeated="2" table:style-name="ce3"/>
          <table:table-cell table:number-columns-repeated="16372"/>
        </table:table-row>
        <table:table-row table:style-name="ro2">
          <table:table-cell table:number-columns-repeated="12" table:style-name="ce3"/>
          <table:table-cell table:number-columns-repeated="16372"/>
        </table:table-row>
        <table:table-row table:style-name="ro2">
          <table:table-cell table:number-columns-repeated="7" table:style-name="ce3"/>
          <table:table-cell table:style-name="ce3">
            <draw:frame draw:z-index="2" draw:id="id1" draw:style-name="a1" draw:name="Chart 2" svg:x="1.1295in" svg:y="0.0114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3"/>
          <table:table-cell table:number-columns-repeated="16372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Nimbus Sans" svg:font-family="&quot;Nimbus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percentage-style style:name="N38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Fran</dc:creator>
    <meta:creation-date>2026-01-05T16:44:19Z</meta:creation-date>
    <dc:date>2026-05-22T21:57:30Z</dc:date>
    <meta:editing-cycles>8</meta:editing-cycles>
    <meta:editing-duration>PT3137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scientific-number number:decimal-places="0" number:min-decimal-places="0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c5c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138c0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00a0fc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vents processed per second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34"/>
          </chart:axis>
          <chart:series chart:label-cell-address="Sheet1.$C$33" chart:values-cell-range-address="Sheet1.$C$34" chart:class="chart:bar" chart:attached-axis="primary-y" chart:style-name="G0S0">
            <chart:data-label chart:style-name="DL00"/>
            <chart:data-point/>
          </chart:series>
          <chart:series chart:label-cell-address="Sheet1.$D$33" chart:values-cell-range-address="Sheet1.$D$34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</chart:series>
          <chart:series chart:label-cell-address="Sheet1.$E$33" chart:values-cell-range-address="Sheet1.$E$34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scientific-number number:decimal-places="0" number:min-decimal-places="0" number:min-integer-digits="1" number:min-exponent-digits="2" number:exponent-interval="1" number:forced-exponent-sign="true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c5c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a0f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G$34"/>
          </chart:axis>
          <chart:series chart:label-cell-address="Sheet1.$H$33" chart:values-cell-range-address="Sheet1.$H$34" chart:class="chart:bar" chart:attached-axis="primary-y" chart:style-name="G0S0">
            <chart:data-label chart:style-name="DL00"/>
            <chart:data-point/>
          </chart:series>
          <chart:series chart:label-cell-address="Sheet1.$I$33" chart:values-cell-range-address="Sheet1.$I$34" chart:class="chart:bar" chart:attached-axis="primary-y" chart:style-name="G0S1">
            <chart:data-label chart:style-name="DL01"/>
            <chart:data-point/>
          </chart:series>
          <chart:series chart:label-cell-address="Sheet1.$J$33" chart:values-cell-range-address="Sheet1.$J$34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